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1.748cm"/>
    </style:style>
    <style:style style:name="co5" style:family="table-column">
      <style:table-column-properties fo:break-before="auto" style:column-width="9.79cm"/>
    </style:style>
    <style:style style:name="co6" style:family="table-column">
      <style:table-column-properties fo:break-before="auto" style:column-width="4.699cm"/>
    </style:style>
    <style:style style:name="co7" style:family="table-column">
      <style:table-column-properties fo:break-before="auto" style:column-width="8.811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15.663cm"/>
    </style:style>
    <style:style style:name="co10" style:family="table-column">
      <style:table-column-properties fo:break-before="auto" style:column-width="5.874cm"/>
    </style:style>
    <style:style style:name="co11" style:family="table-column">
      <style:table-column-properties fo:break-before="auto" style:column-width="12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ta1" style:family="table" style:master-page-name="PageStyle_5f_Benchmark-Kategorien">
      <style:table-properties table:display="true" style:writing-mode="lr-tb"/>
    </style:style>
    <style:style style:name="ta2" style:family="table" style:master-page-name="PageStyle_5f_Tools_20__26__20_Frameworks">
      <style:table-properties table:display="true" style:writing-mode="lr-tb"/>
    </style:style>
    <style:style style:name="ta3" style:family="table" style:master-page-name="PageStyle_5f_Empfehlungen_20__28_lokale_20_LLMs_29_">
      <style:table-properties table:display="true" style:writing-mode="lr-tb"/>
    </style:style>
    <style:style style:name="ta4" style:family="table" style:master-page-name="PageStyle_5f_Tipps_20__28_16_20_GB_20_VRAM_29_">
      <style:table-properties table:display="true" style:writing-mode="lr-tb"/>
    </style:style>
    <style:style style:name="ta5" style:family="table" style:master-page-name="PageStyle_5f_Vergleichsplattformen">
      <style:table-properties table:display="true" style:writing-mode="lr-tb"/>
    </style:style>
    <style:style style:name="ce1" style:family="table-cell" style:parent-style-name="Default">
      <style:table-cell-properties fo:background-color="#4472c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Benchmark-Kategori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Quelle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Python-Coding</text:p>
          </table:table-cell>
          <table:table-cell office:value-type="string" calcext:value-type="string">
            <text:p>HumanEval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MBPP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APPS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EvalPlus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SWE-bench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Mathematik</text:p>
          </table:table-cell>
          <table:table-cell office:value-type="string" calcext:value-type="string">
            <text:p>GSM8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Math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Numina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Datenanalyse</text:p>
          </table:table-cell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Sprachverständnis</text:p>
          </table:table-cell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HellaSwag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Truthful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Reasoning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GP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Long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FLAS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Pla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Komplexe Aufgabenplanung</text:p>
          </table:table-cell>
          <table:table-cell office:value-type="string" calcext:value-type="string">
            <text:p>ALFWorld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WebShop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Mind2Web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Agent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Sicherheit</text:p>
          </table:table-cell>
          <table:table-cell office:value-type="string" calcext:value-type="string">
            <text:p>AgentHarm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</table:table>
      <table:table table:name="Tools &amp; Frameworks" table:style-name="ta2">
        <office:forms form:automatic-focus="false" form:apply-design-mode="false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GitHub / URL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lm-evaluation-harness</text:p>
          </table:table-cell>
          <table:table-cell office:value-type="string" calcext:value-type="string">
            <text:p>Standard-Tool (200+ Benchmarks); MMLU, ARC, HellaSwag, GSM8K, TruthfulQA, Winogrande</text:p>
          </table:table-cell>
          <table:table-cell office:value-type="string" calcext:value-type="string">
            <text:p><text:a xlink:href="https://github.com/EleutherAI/lm-evaluation-harness" xlink:type="simple">https://github.com/EleutherAI/lm-evaluation-harness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alplus</text:p>
          </table:table-cell>
          <table:table-cell office:value-type="string" calcext:value-type="string">
            <text:p>Erweitert lm-eval um Code-Ausführung (HumanEval+, MBPP+)</text:p>
          </table:table-cell>
          <table:table-cell office:value-type="string" calcext:value-type="string">
            <text:p><text:a xlink:href="https://github.com/evalplus/evalplus" xlink:type="simple">https://github.com/evalplus/evalplus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ngtest</text:p>
          </table:table-cell>
          <table:table-cell office:value-type="string" calcext:value-type="string">
            <text:p>Einfache API für Benchmarks (HumanEval, MMLU etc.)</text:p>
          </table:table-cell>
          <table:table-cell office:value-type="string" calcext:value-type="string">
            <text:p><text:a xlink:href="https://github.com/osunlpyang/langtest" xlink:type="simple">https://github.com/osunlpyang/langtest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pen-llm-leaderboard</text:p>
          </table:table-cell>
          <table:table-cell office:value-type="string" calcext:value-type="string">
            <text:p>Leaderboard für lokale LLMs mit Standard-Benchmark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TinyBenchmarks</text:p>
          </table:table-cell>
          <table:table-cell office:value-type="string" calcext:value-type="string">
            <text:p>Mini-Benchmarks für 1B-7B Modelle (TinyMMLU, TinyARC, TinyHellaSwag)</text:p>
          </table:table-cell>
          <table:table-cell office:value-type="string" calcext:value-type="string">
            <text:p><text:a xlink:href="https://github.com/UKPLab/emnlp2023-tinybenchmarks" xlink:type="simple">https://github.com/UKPLab/emnlp2023-tinybenchmarks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calLLM Benchmark</text:p>
          </table:table-cell>
          <table:table-cell office:value-type="string" calcext:value-type="string">
            <text:p>Einfacher Benchmark für lokale LLMs auf Consumer-Hardware</text:p>
          </table:table-cell>
          <table:table-cell office:value-type="string" calcext:value-type="string">
            <text:p><text:a xlink:href="https://github.com/ParisNeo/lollm-benchmark" xlink:type="simple">https://github.com/ParisNeo/lollm-benchmark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GIEval</text:p>
          </table:table-cell>
          <table:table-cell office:value-type="string" calcext:value-type="string">
            <text:p>Testet allgemeine Intelligenz in Mathematik, Logik, Sprachverständnis</text:p>
          </table:table-cell>
          <table:table-cell office:value-type="string" calcext:value-type="string">
            <text:p><text:a xlink:href="https://github.com/ruixiangcui/AgiEval" xlink:type="simple">https://github.com/ruixiangcui/AgiEval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GPT4All Benchmark</text:p>
          </table:table-cell>
          <table:table-cell office:value-type="string" calcext:value-type="string">
            <text:p>Benchmark-Suite optimiert für lokale Ausführung (GSM8K, TruthfulQA)</text:p>
          </table:table-cell>
          <table:table-cell office:value-type="string" calcext:value-type="string">
            <text:p><text:a xlink:href="https://github.com/nomic-ai/gpt4all" xlink:type="simple">https://github.com/nomic-ai/gpt4all</text:a>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ooper.AI TestBench</text:p>
          </table:table-cell>
          <table:table-cell office:value-type="string" calcext:value-type="string">
            <text:p>25 parallele Tests im Browser über OpenAI-kompatible API</text:p>
          </table:table-cell>
          <table:table-cell office:value-type="string" calcext:value-type="string">
            <text:p><text:a xlink:href="https://www.trooper.ai/" xlink:type="simple">https://www.trooper.ai</text:a> </text:p>
          </table:table-cell>
          <table:table-cell table:style-name="Default" table:number-columns-repeated="16381"/>
        </table:table-row>
      </table:table>
      <table:table table:name="Empfehlungen (lokale LLMs)" table:style-name="ta3">
        <office:forms form:automatic-focus="false" form:apply-design-mode="false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7" table:default-cell-style-name="ce3"/>
        <table:table-column table:style-name="co3" table:number-columns-repeated="16379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Unterstützte Tasks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Besonderheiten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LM Evaluation Harness</text:p>
          </table:table-cell>
          <table:table-cell office:value-type="string" calcext:value-type="string">
            <text:p>github.com/EleutherAI/lm-evaluation-harness</text:p>
          </table:table-cell>
          <table:table-cell office:value-type="string" calcext:value-type="string">
            <text:p>MMLU, GSM8K, ARC, HellaSwag, Winogrande, TruthfulQA</text:p>
          </table:table-cell>
          <table:table-cell office:value-type="string" calcext:value-type="string">
            <text:p>16 GB VRAM (7B-13B)</text:p>
          </table:table-cell>
          <table:table-cell office:value-type="string" calcext:value-type="string">
            <text:p>Flexibel, aktiv gewartet, viele Benchmarks. Das Hauptwerkzeug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inyBenchmarks</text:p>
          </table:table-cell>
          <table:table-cell office:value-type="string" calcext:value-type="string">
            <text:p>github.com/UKPLab/emnlp2023-tinybenchmarks</text:p>
          </table:table-cell>
          <table:table-cell office:value-type="string" calcext:value-type="string">
            <text:p>TinyMMLU, TinyARC, TinyHellaSwag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Ideal für kleine Modelle, ressourcenschonend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ocalLLM Benchmark</text:p>
          </table:table-cell>
          <table:table-cell office:value-type="string" calcext:value-type="string">
            <text:p>github.com/ParisNeo/lollm-benchmark</text:p>
          </table:table-cell>
          <table:table-cell office:value-type="string" calcext:value-type="string">
            <text:p>MMLU, GSM8K, ARC, HellaSwag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Einfach, lokal optimiert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GIEval</text:p>
          </table:table-cell>
          <table:table-cell office:value-type="string" calcext:value-type="string">
            <text:p>github.com/ruixiangcui/AgiEval</text:p>
          </table:table-cell>
          <table:table-cell office:value-type="string" calcext:value-type="string">
            <text:p>Mathematik, Logik, Sprachverständnis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Fokus auf allgemeine Intelligenz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PT4All Suite</text:p>
          </table:table-cell>
          <table:table-cell office:value-type="string" calcext:value-type="string">
            <text:p>github.com/nomic-ai/gpt4all</text:p>
          </table:table-cell>
          <table:table-cell office:value-type="string" calcext:value-type="string">
            <text:p>GSM8K, TruthfulQA, NaturalQuestions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Optimiert für lokale Ausführung</text:p>
          </table:table-cell>
          <table:table-cell table:style-name="Default" table:number-columns-repeated="16379"/>
        </table:table-row>
      </table:table>
      <table:table table:name="Tipps (16 GB VRAM)" table:style-name="ta4">
        <office:forms form:automatic-focus="false" form:apply-design-mode="false"/>
        <table:table-column table:style-name="co1" table:default-cell-style-name="ce3"/>
        <table:table-column table:style-name="co9" table:default-cell-style-name="ce3"/>
        <table:table-column table:style-name="co3" table:number-columns-repeated="16382"/>
        <table:table-row table:style-name="ro1">
          <table:table-cell table:style-name="ce1" office:value-type="string" calcext:value-type="string">
            <text:p>Massnahme</text:p>
          </table:table-cell>
          <table:table-cell table:style-name="ce1" office:value-type="string" calcext:value-type="string">
            <text:p>Details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Quantisierung nutzen</text:p>
          </table:table-cell>
          <table:table-cell office:value-type="string" calcext:value-type="string">
            <text:p>4-bit oder 8-bit (bitsandbytes, GPTQ) spart VRAM:</text:p>
            <text:p>model = AutoModelForCausalLM.from_pretrained(..., load_in_4bit=True)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Batch-Größe anpassen</text:p>
          </table:table-cell>
          <table:table-cell office:value-type="string" calcext:value-type="string">
            <text:p>Batch size auf 1-2 reduzieren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FP16 (halbgenau)</text:p>
          </table:table-cell>
          <table:table-cell office:value-type="string" calcext:value-type="string">
            <text:p>model = model.half() – reduziert VRAM-Verbrauch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CPU-Offloading</text:p>
          </table:table-cell>
          <table:table-cell office:value-type="string" calcext:value-type="string">
            <text:p>device_map='auto' mit accelerate – Teile des Modells auf CPU auslagern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KV-Cache-Quantisierung</text:p>
          </table:table-cell>
          <table:table-cell office:value-type="string" calcext:value-type="string">
            <text:p>K-Cache q8_0 + V-Cache q4_0 spart ~62.5% KV-VRAM</text:p>
            <text:p>(Nicht bei Qwen2.5 oder Gemma-4 – dort qualitätskritisch)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Kontextlänge reduzieren</text:p>
          </table:table-cell>
          <table:table-cell office:value-type="string" calcext:value-type="string">
            <text:p>contextLength auf 8192–16384 senken spart KV-Cache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Modelle mit MoE bevorzugen</text:p>
          </table:table-cell>
          <table:table-cell office:value-type="string" calcext:value-type="string">
            <text:p>Mixture-of-Experts (z.B. Qwen3, LFM2) haben nur 10-20% aktive Parameter pro Token</text:p>
          </table:table-cell>
          <table:table-cell table:style-name="Default" table:number-columns-repeated="16382"/>
        </table:table-row>
      </table:table>
      <table:table table:name="Vergleichsplattformen" table:style-name="ta5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Plattform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R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veBench</text:p>
          </table:table-cell>
          <table:table-cell office:value-type="string" calcext:value-type="string">
            <text:p>Vermeidet Testdatensatz-Kontamination, objektive LLM-Bewertung</text:p>
          </table:table-cell>
          <table:table-cell office:value-type="string" calcext:value-type="string">
            <text:p>https://livebench.ai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ellum LLM Leaderboard</text:p>
          </table:table-cell>
          <table:table-cell office:value-type="string" calcext:value-type="string">
            <text:p>Regelmässige Rankings (Reasoning, Coding, Mathematik, multilingual)</text:p>
          </table:table-cell>
          <table:table-cell office:value-type="string" calcext:value-type="string">
            <text:p>https://www.vellum.ai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ArtificialAnalysis.ai</text:p>
          </table:table-cell>
          <table:table-cell office:value-type="string" calcext:value-type="string">
            <text:p>Vergleich von 100+ KI-Modellen (Intelligenz, Preis, Leistung, Geschwindigkeit)</text:p>
          </table:table-cell>
          <table:table-cell office:value-type="string" calcext:value-type="string">
            <text:p>https://artificialanalysis.ai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ustbit LLM Leaderboard</text:p>
          </table:table-cell>
          <table:table-cell office:value-type="string" calcext:value-type="string">
            <text:p>Monatliche Rankings für digitale Produktentwicklung</text:p>
          </table:table-cell>
          <table:table-cell office:value-type="string" calcext:value-type="string">
            <text:p>https://www.trustbit.tech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Hugging Face Open LLM Leaderboard</text:p>
          </table:table-cell>
          <table:table-cell office:value-type="string" calcext:value-type="string">
            <text:p>Standard-Leaderboard basierend auf lm-evaluation-harness</text:p>
          </table:table-cell>
          <table:table-cell office:value-type="string" calcext:value-type="string">
            <text:p>https://huggingface.co/open-llm-leaderboard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nchmark-Kategorien" style:display-name="PageStyle_Benchmark-Kategor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gleichsplattformen" style:display-name="PageStyle_Vergleichsplattfor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fehlungen_20__28_lokale_20_LLMs_29_" style:display-name="PageStyle_Empfehlungen (lokale LLM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_20__26__20_Frameworks" style:display-name="PageStyle_Tools &amp; Framewor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ps_20__28_16_20_GB_20_VRAM_29_" style:display-name="PageStyle_Tipps (16 GB VRA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7-08T19:50:08</meta:creation-date>
    <dc:date>2026-07-08T21:52:09.622849800</dc:date>
    <meta:generator>LibreOffice/26.2.4.2$Windows_X86_64 LibreOffice_project/0229ac93fcf0d7cbc6376066c6f35021cef002dc</meta:generator>
    <meta:editing-duration>PT1M14S</meta:editing-duration>
    <meta:editing-cycles>1</meta:editing-cycles>
    <meta:document-statistic meta:table-count="5" meta:cell-count="164" meta:object-count="0"/>
    <meta:user-defined meta:name="AppVersion">3.1</meta:user-defined>
  </office:meta>
</office:document-meta>
</file>